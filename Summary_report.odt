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00%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start" fo:line-height="10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line-height="100%" fo:margin-left="0in" fo:text-indent="0in">
        <style:tab-stops/>
      </style:paragraph-properties>
    </style:style>
    <style:style style:name="P4" style:parent-style-name="Normal" style:family="paragraph">
      <style:paragraph-properties fo:text-align="start" fo:line-height="100%" fo:margin-left="0in" fo:text-indent="0in">
        <style:tab-stops/>
      </style:paragraph-properties>
    </style:style>
    <style:style style:name="P5" style:parent-style-name="Normal" style:family="paragraph">
      <style:paragraph-properties fo:text-align="start" fo:line-height="100%"/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start" fo:line-height="100%"/>
    </style:style>
    <style:style style:name="P7" style:parent-style-name="ListParagraph" style:list-style-name="LFO1" style:family="paragraph">
      <style:paragraph-properties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ListParagraph" style:list-style-name="LFO1" style:family="paragraph">
      <style:paragraph-properties fo:line-height="100%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stParagraph" style:list-style-name="LFO1" style:family="paragraph">
      <style:paragraph-properties fo:line-height="100%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ListParagraph" style:list-style-name="LF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line-height="100%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start" fo:line-height="100%"/>
    </style:style>
    <style:style style:name="P16" style:parent-style-name="Normal" style:family="paragraph">
      <style:paragraph-properties fo:text-align="start" fo:line-height="100%"/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list-style-name="LFO2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18" style:parent-style-name="Normal" style:list-style-name="LFO2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19" style:parent-style-name="Normal" style:list-style-name="LFO2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20" style:parent-style-name="Normal" style:list-style-name="LFO2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21" style:parent-style-name="Normal" style:list-style-name="LF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22" style:parent-style-name="Normal" style:family="paragraph">
      <style:paragraph-properties fo:text-align="start" fo:line-height="100%"/>
    </style:style>
    <style:style style:name="P23" style:parent-style-name="Normal" style:family="paragraph">
      <style:paragraph-properties fo:text-align="start" fo:line-height="100%"/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" style:list-style-name="LFO3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25" style:parent-style-name="Normal" style:list-style-name="LFO3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26" style:parent-style-name="Normal" style:list-style-name="LFO3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27" style:parent-style-name="Normal" style:list-style-name="LFO3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28" style:parent-style-name="Normal" style:list-style-name="LFO3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29" style:parent-style-name="Normal" style:family="paragraph">
      <style:paragraph-properties fo:text-align="start" fo:line-height="100%"/>
    </style:style>
    <style:style style:name="P30" style:parent-style-name="Normal" style:family="paragraph">
      <style:paragraph-properties fo:text-align="start" fo:line-height="100%"/>
    </style:style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2" style:parent-style-name="Normal" style:list-style-name="LFO4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33" style:parent-style-name="Normal" style:list-style-name="LFO4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34" style:parent-style-name="Normal" style:list-style-name="LFO4" style:family="paragraph">
      <style:paragraph-properties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35" style:parent-style-name="Normal" style:list-style-name="LFO4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line-height="100%">
        <style:tab-stops>
          <style:tab-stop style:type="left" style:position="0in"/>
          <style:tab-stop style:type="left" style:position="0.25in"/>
        </style:tab-stops>
      </style:paragraph-properties>
    </style:style>
    <style:style style:name="P36" style:parent-style-name="Normal" style:family="paragraph">
      <style:paragraph-properties fo:text-align="start" fo:line-height="100%"/>
    </style:style>
    <style:style style:name="P37" style:parent-style-name="Normal" style:family="paragraph">
      <style:paragraph-properties fo:text-align="start" fo:line-height="100%"/>
      <style:text-properties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paragraph-properties fo:line-height="100%" fo:margin-left="0in" fo:text-indent="0in">
        <style:tab-stops/>
      </style:paragraph-properties>
    </style:style>
    <style:style style:name="P39" style:parent-style-name="Normal" style:family="paragraph">
      <style:paragraph-properties fo:text-align="start" fo:line-height="100%"/>
    </style:style>
  </office:automatic-styles>
  <office:body>
    <office:text text:use-soft-page-breaks="true">
      <text:p text:style-name="P1">LLM &amp; Generative AI Training – Experimental Summary</text:p>
      <text:p text:style-name="P2">1. Introduction</text:p>
      <text:p text:style-name="P3">This exercise focused on exploring the practical implementation of Large Language Models (LLMs) using an API-based approach. The objective was to understand how prompt design, parameter tuning, and API interactions influence model behavior and output quality.</text:p>
      <text:p text:style-name="P4"/>
      <text:p text:style-name="P5">2. Experiments Performed</text:p>
      <text:p text:style-name="P6">During the exercise, multiple experiments were conducted:</text:p>
      <text:list text:style-name="LFO1" text:continue-numbering="true">
        <text:list-item>
          <text:p text:style-name="P7"><text:span text:style-name="T8">Prompt Variations:</text:span><text:s/>Compared unstructured prompts with structured formats ([Context, Task, Constraints, Output]).</text:p>
        </text:list-item>
        <text:list-item>
          <text:p text:style-name="P9"><text:span text:style-name="T10">Parameter Tuning:</text:span><text:s/>Adjusted temperature and max token values to observe changes in output style and length.</text:p>
        </text:list-item>
        <text:list-item>
          <text:p text:style-name="P11"><text:span text:style-name="T12">Use Case Testing:</text:span><text:s/>Applied the model to different tasks including summarization, sentiment analysis, and code generation.</text:p>
        </text:list-item>
        <text:list-item>
          <text:p text:style-name="P13"><text:span text:style-name="T14">Retry Mechanism Testing:</text:span><text:s/>Observed system behavior under simulated API failures such as rate limits and timeouts.</text:p>
        </text:list-item>
      </text:list>
      <text:p text:style-name="P15"/>
      <text:p text:style-name="P16">3. Key Observations</text:p>
      <text:list text:style-name="LFO2" text:continue-numbering="true">
        <text:list-item>
          <text:p text:style-name="P17">Structured prompts produced significantly more consistent and relevant outputs compared to unstructured prompts.</text:p>
        </text:list-item>
        <text:list-item>
          <text:p text:style-name="P18">Lower temperature values resulted in deterministic and factual responses, while higher values increased creativity but reduced reliability.</text:p>
        </text:list-item>
        <text:list-item>
          <text:p text:style-name="P19">Increasing max tokens increased response length but did not always improve quality.</text:p>
        </text:list-item>
        <text:list-item>
          <text:p text:style-name="P20">The model showed sensitivity to small prompt changes, affecting output significantly.</text:p>
        </text:list-item>
        <text:list-item>
          <text:p text:style-name="P21">Retry mechanisms improved system stability under API constraints.</text:p>
        </text:list-item>
      </text:list>
      <text:p text:style-name="P22"/>
      <text:p text:style-name="P23">4. Learnings</text:p>
      <text:list text:style-name="LFO3" text:continue-numbering="true">
        <text:list-item>
          <text:p text:style-name="P24">Prompt engineering is critical for controlling LLM output and ensuring consistency.</text:p>
        </text:list-item>
        <text:list-item>
          <text:p text:style-name="P25">API abstraction simplifies interaction and allows flexibility in model usage.</text:p>
        </text:list-item>
        <text:list-item>
          <text:p text:style-name="P26">Parameter tuning provides control over response creativity, length, and cost.</text:p>
        </text:list-item>
        <text:list-item>
          <text:p text:style-name="P27">LLMs are powerful but require validation and structured handling for reliable usage.</text:p>
        </text:list-item>
        <text:list-item>
          <text:p text:style-name="P28">Building production-ready AI systems requires error handling and resilience strategies.</text:p>
        </text:list-item>
      </text:list>
      <text:p text:style-name="P29"/>
      <text:p text:style-name="P30"><text:span text:style-name="T31">5. Challenges Faced</text:span></text:p>
      <text:list text:style-name="LFO4" text:continue-numbering="true">
        <text:list-item>
          <text:p text:style-name="P32">Encountered rate limiting (429 errors) during repeated API calls.</text:p>
        </text:list-item>
        <text:list-item>
          <text:p text:style-name="P33">Occasional inconsistent or hallucinated outputs from the model.</text:p>
        </text:list-item>
        <text:list-item>
          <text:p text:style-name="P34">Difficulty in balancing creativity and accuracy using temperature settings.</text:p>
        </text:list-item>
        <text:list-item>
          <text:p text:style-name="P35">Debugging API request formatting and response parsing.</text:p>
        </text:list-item>
      </text:list>
      <text:p text:style-name="P36"/>
      <text:p text:style-name="P37">6. Conclusion</text:p>
      <text:p text:style-name="P38">This exercise provided hands-on experience in working with LLMs in a practical environment. It highlighted the importance of structured prompting, parameter optimization, and system reliability. These insights are essential for developing scalable and production<text:s/>ready AI applications.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300%" fo:margin-left="0.25in" fo:text-indent="-0.25in" fo:background-color="transparent" style:tab-stop-distance="0.5in">
        <style:tab-stops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hash Venkatesh</meta:initial-creator>
    <dc:creator>Yashash Venkatesh</dc:creator>
    <meta:creation-date>2026-04-16T20:34:00Z</meta:creation-date>
    <dc:date>2026-04-17T06:34:00Z</dc:date>
    <meta:template xlink:href="Normal" xlink:type="simple"/>
    <meta:editing-cycles>3</meta:editing-cycles>
    <meta:editing-duration>PT5040S</meta:editing-duration>
    <meta:document-statistic meta:page-count="1" meta:paragraph-count="4" meta:word-count="356" meta:character-count="2383" meta:row-count="16" meta:non-whitespace-character-count="2031"/>
  </office:meta>
</office:document-meta>
</file>